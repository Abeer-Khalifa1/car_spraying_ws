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b2b" officeooo:paragraph-rsid="0014ab2b"/>
    </style:style>
    <style:style style:name="P2" style:family="paragraph" style:parent-style-name="Standard">
      <style:text-properties fo:font-weight="bold" officeooo:rsid="0014ab2b" officeooo:paragraph-rsid="0014ab2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following Files are added externally and are not generated from moveit itself</text:p>
      <text:p text:style-name="P1"/>
      <text:p text:style-name="P1">ompl_planning</text:p>
      <text:p text:style-name="P1">chomp_planning</text:p>
      <text:p text:style-name="P1">lerp_plann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03:06:28.884136940</meta:creation-date>
    <dc:date>2026-02-15T03:07:48.755987306</dc:date>
    <meta:editing-duration>PT1M20S</meta:editing-duration>
    <meta:editing-cycles>1</meta:editing-cycles>
    <meta:document-statistic meta:table-count="0" meta:image-count="0" meta:object-count="0" meta:page-count="1" meta:paragraph-count="4" meta:word-count="16" meta:character-count="121" meta:non-whitespace-character-count="109"/>
    <meta:generator>LibreOffice/24.2.7.2$Linux_X86_64 LibreOffice_project/420$Build-2</meta:generator>
  </office:meta>
</office:document-meta>
</file>